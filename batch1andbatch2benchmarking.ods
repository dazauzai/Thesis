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QSR</text:p>
          </table:table-cell>
          <table:table-cell office:value-type="string" calcext:value-type="string">
            <text:p>bed_proce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gene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table:formula="of:=[.D2]/([.D2]+[.E2])" office:value-type="float" office:value="0.161538461538462" calcext:value-type="float">
            <text:p>0.161538461538462</text:p>
          </table:table-cell>
          <table:table-cell table:formula="of:=[.D2]/([.D2]+[.F2])" office:value-type="float" office:value="0.875" calcext:value-type="float">
            <text:p>0.875</text:p>
          </table:table-cell>
          <table:table-cell table:formula="of:=2*[.I2]*[.J2]/([.I2]+[.J2])" office:value-type="float" office:value="0.272727272727273" calcext:value-type="float">
            <text:p>0.272727272727273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event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table:formula="of:=[.D3]/([.D3]+[.E3])" office:value-type="float" office:value="0.229946524064171" calcext:value-type="float">
            <text:p>0.229946524064171</text:p>
          </table:table-cell>
          <table:table-cell table:formula="of:=[.D3]/([.D3]+[.F3])" office:value-type="float" office:value="0.977272727272727" calcext:value-type="float">
            <text:p>0.977272727272727</text:p>
          </table:table-cell>
          <table:table-cell table:formula="of:=2*[.I3]*[.J3]/([.I3]+[.J3])" office:value-type="float" office:value="0.372294372294372" calcext:value-type="float">
            <text:p>0.372294372294372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BP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</text:p>
          </table:table-cell>
          <table:table-cell table:formula="of:=[.D4]/([.D4]+[.E4])" office:value-type="float" office:value="0.0344827586206897" calcext:value-type="float">
            <text:p>0.0344827586206897</text:p>
          </table:table-cell>
          <table:table-cell table:formula="of:=[.D4]/([.D4]+[.F4])" office:value-type="float" office:value="0.212765957446808" calcext:value-type="float">
            <text:p>0.212765957446808</text:p>
          </table:table-cell>
          <table:table-cell table:formula="of:=2*[.I4]*[.J4]/([.I4]+[.J4])" office:value-type="float" office:value="0.0593471810089021" calcext:value-type="float">
            <text:p>0.0593471810089021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intersect</text:p>
          </table:table-cell>
          <table:table-cell office:value-type="float" office:value="1844650" calcext:value-type="float">
            <text:p>1844650</text:p>
          </table:table-cell>
          <table:table-cell office:value-type="float" office:value="234434623" calcext:value-type="float">
            <text:p>234434623</text:p>
          </table:table-cell>
          <table:table-cell office:value-type="float" office:value="22243" calcext:value-type="float">
            <text:p>22243</text:p>
          </table:table-cell>
          <table:table-cell table:number-columns-repeated="2" office:value-type="string" calcext:value-type="string">
            <text:p>y</text:p>
          </table:table-cell>
          <table:table-cell table:formula="of:=[.D5]/([.D5]+[.E5])" office:value-type="float" office:value="0.00780707497775313" calcext:value-type="float">
            <text:p>0.00780707497775313</text:p>
          </table:table-cell>
          <table:table-cell table:formula="of:=[.D5]/([.D5]+[.F5])" office:value-type="float" office:value="0.988085551769705" calcext:value-type="float">
            <text:p>0.988085551769705</text:p>
          </table:table-cell>
          <table:table-cell table:formula="of:=2*[.I5]*[.J5]/([.I5]+[.J5])" office:value-type="float" office:value="0.0154917463588307" calcext:value-type="float">
            <text:p>0.0154917463588307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gene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table:formula="of:=[.D6]/([.D6]+[.E6])" office:value-type="float" office:value="0.21505376344086" calcext:value-type="float">
            <text:p>0.21505376344086</text:p>
          </table:table-cell>
          <table:table-cell table:formula="of:=[.D6]/([.D6]+[.F6])" office:value-type="float" office:value="0.833333333333333" calcext:value-type="float">
            <text:p>0.833333333333333</text:p>
          </table:table-cell>
          <table:table-cell table:formula="of:=2*[.I6]*[.J6]/([.I6]+[.J6])" office:value-type="float" office:value="0.341880341880342" calcext:value-type="float">
            <text:p>0.341880341880342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event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formula="of:=[.D7]/([.D7]+[.E7])" office:value-type="float" office:value="0.337662337662338" calcext:value-type="float">
            <text:p>0.337662337662338</text:p>
          </table:table-cell>
          <table:table-cell table:formula="of:=[.D7]/([.D7]+[.F7])" office:value-type="float" office:value="0.838709677419355" calcext:value-type="float">
            <text:p>0.838709677419355</text:p>
          </table:table-cell>
          <table:table-cell table:formula="of:=2*[.I7]*[.J7]/([.I7]+[.J7])" office:value-type="float" office:value="0.481481481481482" calcext:value-type="float">
            <text:p>0.481481481481482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BP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y</text:p>
          </table:table-cell>
          <table:table-cell table:formula="of:=[.D8]/([.D8]+[.E8])" office:value-type="float" office:value="0.0158730158730159" calcext:value-type="float">
            <text:p>0.0158730158730159</text:p>
          </table:table-cell>
          <table:table-cell table:formula="of:=[.D8]/([.D8]+[.F8])" office:value-type="float" office:value="0.0416666666666667" calcext:value-type="float">
            <text:p>0.0416666666666667</text:p>
          </table:table-cell>
          <table:table-cell table:formula="of:=2*[.I8]*[.J8]/([.I8]+[.J8])" office:value-type="float" office:value="0.0229885057471264" calcext:value-type="float">
            <text:p>0.0229885057471264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intersect</text:p>
          </table:table-cell>
          <table:table-cell office:value-type="float" office:value="1759437" calcext:value-type="float">
            <text:p>1759437</text:p>
          </table:table-cell>
          <table:table-cell office:value-type="float" office:value="420253943" calcext:value-type="float">
            <text:p>420253943</text:p>
          </table:table-cell>
          <table:table-cell office:value-type="float" office:value="144251" calcext:value-type="float">
            <text:p>144251</text:p>
          </table:table-cell>
          <table:table-cell table:number-columns-repeated="2" office:value-type="string" calcext:value-type="string">
            <text:p>y</text:p>
          </table:table-cell>
          <table:table-cell table:formula="of:=[.D9]/([.D9]+[.E9])" office:value-type="float" office:value="0.00416914980278587" calcext:value-type="float">
            <text:p>0.00416914980278587</text:p>
          </table:table-cell>
          <table:table-cell table:formula="of:=[.D9]/([.D9]+[.F9])" office:value-type="float" office:value="0.924225503338782" calcext:value-type="float">
            <text:p>0.924225503338782</text:p>
          </table:table-cell>
          <table:table-cell table:formula="of:=2*[.I9]*[.J9]/([.I9]+[.J9])" office:value-type="float" office:value="0.00830085473227514" calcext:value-type="float">
            <text:p>0.00830085473227514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gene</text:p>
          </table:table-cell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table:formula="of:=[.D10]/([.D10]+[.E10])" office:value-type="float" office:value="0.0969162995594714" calcext:value-type="float">
            <text:p>0.0969162995594714</text:p>
          </table:table-cell>
          <table:table-cell table:formula="of:=[.D10]/([.D10]+[.F10])" office:value-type="float" office:value="1" calcext:value-type="float">
            <text:p>1</text:p>
          </table:table-cell>
          <table:table-cell table:formula="of:=2*[.I10]*[.J10]/([.I10]+[.J10])" office:value-type="float" office:value="0.176706827309237" calcext:value-type="float">
            <text:p>0.176706827309237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event</text:p>
          </table:table-cell>
          <table:table-cell office:value-type="float" office:value="556" calcext:value-type="float">
            <text:p>556</text:p>
          </table:table-cell>
          <table:table-cell office:value-type="float" office:value="2994" calcext:value-type="float">
            <text:p>2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table:formula="of:=[.D11]/([.D11]+[.E11])" office:value-type="float" office:value="0.156619718309859" calcext:value-type="float">
            <text:p>0.156619718309859</text:p>
          </table:table-cell>
          <table:table-cell table:formula="of:=[.D11]/([.D11]+[.F11])" office:value-type="float" office:value="0.998204667863555" calcext:value-type="float">
            <text:p>0.998204667863555</text:p>
          </table:table-cell>
          <table:table-cell table:formula="of:=2*[.I11]*[.J11]/([.I11]+[.J11])" office:value-type="float" office:value="0.270757243730217" calcext:value-type="float">
            <text:p>0.270757243730217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BP</text:p>
          </table:table-cell>
          <table:table-cell office:value-type="float" office:value="41" calcext:value-type="float">
            <text:p>41</text:p>
          </table:table-cell>
          <table:table-cell office:value-type="float" office:value="6950" calcext:value-type="float">
            <text:p>69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table:formula="of:=[.D12]/([.D12]+[.E12])" office:value-type="float" office:value="0.00586468316406809" calcext:value-type="float">
            <text:p>0.00586468316406809</text:p>
          </table:table-cell>
          <table:table-cell table:formula="of:=[.D12]/([.D12]+[.F12])" office:value-type="float" office:value="0.931818181818182" calcext:value-type="float">
            <text:p>0.931818181818182</text:p>
          </table:table-cell>
          <table:table-cell table:formula="of:=2*[.I12]*[.J12]/([.I12]+[.J12])" office:value-type="float" office:value="0.0116560056858564" calcext:value-type="float">
            <text:p>0.0116560056858564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intersect</text:p>
          </table:table-cell>
          <table:table-cell office:value-type="float" office:value="158537" calcext:value-type="float">
            <text:p>158537</text:p>
          </table:table-cell>
          <table:table-cell office:value-type="float" office:value="845762" calcext:value-type="float">
            <text:p>845762</text:p>
          </table:table-cell>
          <table:table-cell office:value-type="float" office:value="21637" calcext:value-type="float">
            <text:p>21637</text:p>
          </table:table-cell>
          <table:table-cell table:number-columns-repeated="2" office:value-type="string" calcext:value-type="string">
            <text:p>y</text:p>
          </table:table-cell>
          <table:table-cell table:formula="of:=[.D13]/([.D13]+[.E13])" office:value-type="float" office:value="0.15785836688078" calcext:value-type="float">
            <text:p>0.15785836688078</text:p>
          </table:table-cell>
          <table:table-cell table:formula="of:=[.D13]/([.D13]+[.F13])" office:value-type="float" office:value="0.879910530931211" calcext:value-type="float">
            <text:p>0.879910530931211</text:p>
          </table:table-cell>
          <table:table-cell table:formula="of:=2*[.I13]*[.J13]/([.I13]+[.J13])" office:value-type="float" office:value="0.26769204532311" calcext:value-type="float">
            <text:p>0.26769204532311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gene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14]/([.D14]+[.E14])" office:value-type="float" office:value="0.203703703703704" calcext:value-type="float">
            <text:p>0.203703703703704</text:p>
          </table:table-cell>
          <table:table-cell table:formula="of:=[.D14]/([.D14]+[.F14])" office:value-type="float" office:value="0.916666666666667" calcext:value-type="float">
            <text:p>0.916666666666667</text:p>
          </table:table-cell>
          <table:table-cell table:formula="of:=2*[.I14]*[.J14]/([.I14]+[.J14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event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15]/([.D15]+[.E15])" office:value-type="float" office:value="0.308219178082192" calcext:value-type="float">
            <text:p>0.308219178082192</text:p>
          </table:table-cell>
          <table:table-cell table:formula="of:=[.D15]/([.D15]+[.F15])" office:value-type="float" office:value="1" calcext:value-type="float">
            <text:p>1</text:p>
          </table:table-cell>
          <table:table-cell table:formula="of:=2*[.I15]*[.J15]/([.I15]+[.J15])" office:value-type="float" office:value="0.471204188481675" calcext:value-type="float">
            <text:p>0.471204188481675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BP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16]/([.D16]+[.E16])" office:value-type="float" office:value="0.0343137254901961" calcext:value-type="float">
            <text:p>0.0343137254901961</text:p>
          </table:table-cell>
          <table:table-cell table:formula="of:=[.D16]/([.D16]+[.F16])" office:value-type="float" office:value="0.145833333333333" calcext:value-type="float">
            <text:p>0.145833333333333</text:p>
          </table:table-cell>
          <table:table-cell table:formula="of:=2*[.I16]*[.J16]/([.I16]+[.J16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intersect</text:p>
          </table:table-cell>
          <table:table-cell office:value-type="float" office:value="1881853" calcext:value-type="float">
            <text:p>1881853</text:p>
          </table:table-cell>
          <table:table-cell office:value-type="float" office:value="279828438" calcext:value-type="float">
            <text:p>279828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17]/([.D17]+[.E17])" office:value-type="float" office:value="0.00668010030205109" calcext:value-type="float">
            <text:p>0.00668010030205109</text:p>
          </table:table-cell>
          <table:table-cell table:formula="of:=[.D17]/([.D17]+[.F17])" office:value-type="float" office:value="1" calcext:value-type="float">
            <text:p>1</text:p>
          </table:table-cell>
          <table:table-cell table:formula="of:=2*[.I17]*[.J17]/([.I17]+[.J17])" office:value-type="float" office:value="0.013271545350001" calcext:value-type="float">
            <text:p>0.013271545350001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gene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18]/([.D18]+[.E18])" office:value-type="float" office:value="0.238636363636364" calcext:value-type="float">
            <text:p>0.238636363636364</text:p>
          </table:table-cell>
          <table:table-cell table:formula="of:=[.D18]/([.D18]+[.F18])" office:value-type="float" office:value="0.875" calcext:value-type="float">
            <text:p>0.875</text:p>
          </table:table-cell>
          <table:table-cell table:formula="of:=2*[.I18]*[.J18]/([.I18]+[.J18])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even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19]/([.D19]+[.E19])" office:value-type="float" office:value="0.342105263157895" calcext:value-type="float">
            <text:p>0.342105263157895</text:p>
          </table:table-cell>
          <table:table-cell table:formula="of:=[.D19]/([.D19]+[.F19])" office:value-type="float" office:value="0.896551724137931" calcext:value-type="float">
            <text:p>0.896551724137931</text:p>
          </table:table-cell>
          <table:table-cell table:formula="of:=2*[.I19]*[.J19]/([.I19]+[.J19])" office:value-type="float" office:value="0.495238095238095" calcext:value-type="float">
            <text:p>0.495238095238095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BP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20]/([.D20]+[.E20])" office:value-type="float" office:value="0.0163934426229508" calcext:value-type="float">
            <text:p>0.0163934426229508</text:p>
          </table:table-cell>
          <table:table-cell table:formula="of:=[.D20]/([.D20]+[.F20])" office:value-type="float" office:value="0.0416666666666667" calcext:value-type="float">
            <text:p>0.0416666666666667</text:p>
          </table:table-cell>
          <table:table-cell table:formula="of:=2*[.I20]*[.J20]/([.I20]+[.J20])" office:value-type="float" office:value="0.0235294117647059" calcext:value-type="float">
            <text:p>0.0235294117647059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intersect</text:p>
          </table:table-cell>
          <table:table-cell office:value-type="float" office:value="1736739" calcext:value-type="float">
            <text:p>1736739</text:p>
          </table:table-cell>
          <table:table-cell office:value-type="float" office:value="333792065" calcext:value-type="float">
            <text:p>333792065</text:p>
          </table:table-cell>
          <table:table-cell office:value-type="float" office:value="132298" calcext:value-type="float">
            <text:p>1322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21]/([.D21]+[.E21])" office:value-type="float" office:value="0.00517612490878727" calcext:value-type="float">
            <text:p>0.00517612490878727</text:p>
          </table:table-cell>
          <table:table-cell table:formula="of:=[.D21]/([.D21]+[.F21])" office:value-type="float" office:value="0.929215954526315" calcext:value-type="float">
            <text:p>0.929215954526315</text:p>
          </table:table-cell>
          <table:table-cell table:formula="of:=2*[.I21]*[.J21]/([.I21]+[.J21])" office:value-type="float" office:value="0.0102949028651313" calcext:value-type="float">
            <text:p>0.0102949028651313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gene</text:p>
          </table:table-cell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22]/([.D22]+[.E22])" office:value-type="float" office:value="0.0969162995594714" calcext:value-type="float">
            <text:p>0.0969162995594714</text:p>
          </table:table-cell>
          <table:table-cell table:formula="of:=[.D22]/([.D22]+[.F22])" office:value-type="float" office:value="1" calcext:value-type="float">
            <text:p>1</text:p>
          </table:table-cell>
          <table:table-cell table:formula="of:=2*[.I22]*[.J22]/([.I22]+[.J22])" office:value-type="float" office:value="0.176706827309237" calcext:value-type="float">
            <text:p>0.176706827309237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event</text:p>
          </table:table-cell>
          <table:table-cell office:value-type="float" office:value="558" calcext:value-type="float">
            <text:p>558</text:p>
          </table:table-cell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23]/([.D23]+[.E23])" office:value-type="float" office:value="0.154016008832459" calcext:value-type="float">
            <text:p>0.154016008832459</text:p>
          </table:table-cell>
          <table:table-cell table:formula="of:=[.D23]/([.D23]+[.F23])" office:value-type="float" office:value="1" calcext:value-type="float">
            <text:p>1</text:p>
          </table:table-cell>
          <table:table-cell table:formula="of:=2*[.I23]*[.J23]/([.I23]+[.J23])" office:value-type="float" office:value="0.266921789045683" calcext:value-type="float">
            <text:p>0.266921789045683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BP</text:p>
          </table:table-cell>
          <table:table-cell office:value-type="float" office:value="43" calcext:value-type="float">
            <text:p>43</text:p>
          </table:table-cell>
          <table:table-cell office:value-type="float" office:value="7090" calcext:value-type="float">
            <text:p>7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24]/([.D24]+[.E24])" office:value-type="float" office:value="0.00602831908033086" calcext:value-type="float">
            <text:p>0.00602831908033086</text:p>
          </table:table-cell>
          <table:table-cell table:formula="of:=[.D24]/([.D24]+[.F24])" office:value-type="float" office:value="0.977272727272727" calcext:value-type="float">
            <text:p>0.977272727272727</text:p>
          </table:table-cell>
          <table:table-cell table:formula="of:=2*[.I24]*[.J24]/([.I24]+[.J24])" office:value-type="float" office:value="0.0119827225860387" calcext:value-type="float">
            <text:p>0.0119827225860387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intersect</text:p>
          </table:table-cell>
          <table:table-cell office:value-type="float" office:value="159283" calcext:value-type="float">
            <text:p>159283</text:p>
          </table:table-cell>
          <table:table-cell office:value-type="float" office:value="858556" calcext:value-type="float">
            <text:p>858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25]/([.D25]+[.E25])" office:value-type="float" office:value="0.1564913507932" calcext:value-type="float">
            <text:p>0.1564913507932</text:p>
          </table:table-cell>
          <table:table-cell table:formula="of:=[.D25]/([.D25]+[.F25])" office:value-type="float" office:value="1" calcext:value-type="float">
            <text:p>1</text:p>
          </table:table-cell>
          <table:table-cell table:formula="of:=2*[.I25]*[.J25]/([.I25]+[.J25])" office:value-type="float" office:value="0.270631251476058" calcext:value-type="float">
            <text:p>0.270631251476058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gene</text:p>
          </table:table-cell>
          <table:table-cell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formula="of:=[.D26]/([.D26]+[.E26])" office:value-type="float" office:value="0.141304347826087" calcext:value-type="float">
            <text:p>0.141304347826087</text:p>
          </table:table-cell>
          <table:table-cell table:formula="of:=[.D26]/([.D26]+[.F26])" office:value-type="float" office:value="1" calcext:value-type="float">
            <text:p>1</text:p>
          </table:table-cell>
          <table:table-cell table:formula="of:=2*[.I26]*[.J26]/([.I26]+[.J26])" office:value-type="float" office:value="0.247619047619048" calcext:value-type="float">
            <text:p>0.247619047619048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event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formula="of:=[.D27]/([.D27]+[.E27])" office:value-type="float" office:value="0.336734693877551" calcext:value-type="float">
            <text:p>0.336734693877551</text:p>
          </table:table-cell>
          <table:table-cell table:formula="of:=[.D27]/([.D27]+[.F27])" office:value-type="float" office:value="1" calcext:value-type="float">
            <text:p>1</text:p>
          </table:table-cell>
          <table:table-cell table:formula="of:=2*[.I27]*[.J27]/([.I27]+[.J27])" office:value-type="float" office:value="0.50381679389313" calcext:value-type="float">
            <text:p>0.50381679389313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BP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</text:p>
          </table:table-cell>
          <table:table-cell table:formula="of:=[.D28]/([.D28]+[.E28])" office:value-type="float" office:value="0.0514705882352941" calcext:value-type="float">
            <text:p>0.0514705882352941</text:p>
          </table:table-cell>
          <table:table-cell table:formula="of:=[.D28]/([.D28]+[.F28])" office:value-type="float" office:value="0.127272727272727" calcext:value-type="float">
            <text:p>0.127272727272727</text:p>
          </table:table-cell>
          <table:table-cell table:formula="of:=2*[.I28]*[.J28]/([.I28]+[.J28])" office:value-type="float" office:value="0.0732984293193717" calcext:value-type="float">
            <text:p>0.0732984293193717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intersect</text:p>
          </table:table-cell>
          <table:table-cell office:value-type="float" office:value="1784243" calcext:value-type="float">
            <text:p>1784243</text:p>
          </table:table-cell>
          <table:table-cell office:value-type="float" office:value="921347667" calcext:value-type="float">
            <text:p>921347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formula="of:=[.D29]/([.D29]+[.E29])" office:value-type="float" office:value="0.00193281478050087" calcext:value-type="float">
            <text:p>0.00193281478050087</text:p>
          </table:table-cell>
          <table:table-cell table:formula="of:=[.D29]/([.D29]+[.F29])" office:value-type="float" office:value="1" calcext:value-type="float">
            <text:p>1</text:p>
          </table:table-cell>
          <table:table-cell table:formula="of:=2*[.I29]*[.J29]/([.I29]+[.J29])" office:value-type="float" office:value="0.00385817242830659" calcext:value-type="float">
            <text:p>0.00385817242830659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gene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</text:p>
          </table:table-cell>
          <table:table-cell table:formula="of:=[.D30]/([.D30]+[.E30])" office:value-type="float" office:value="0.1" calcext:value-type="float">
            <text:p>0.1</text:p>
          </table:table-cell>
          <table:table-cell table:formula="of:=[.D30]/([.D30]+[.F30])" office:value-type="float" office:value="0.6" calcext:value-type="float">
            <text:p>0.6</text:p>
          </table:table-cell>
          <table:table-cell table:formula="of:=2*[.I30]*[.J30]/([.I30]+[.J30])" office:value-type="float" office:value="0.171428571428571" calcext:value-type="float">
            <text:p>0.171428571428571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event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formula="of:=[.D31]/([.D31]+[.E31])" office:value-type="float" office:value="0.255102040816327" calcext:value-type="float">
            <text:p>0.255102040816327</text:p>
          </table:table-cell>
          <table:table-cell table:formula="of:=[.D31]/([.D31]+[.F31])" office:value-type="float" office:value="0.961538461538462" calcext:value-type="float">
            <text:p>0.961538461538462</text:p>
          </table:table-cell>
          <table:table-cell table:formula="of:=2*[.I31]*[.J31]/([.I31]+[.J31])" office:value-type="float" office:value="0.403225806451613" calcext:value-type="float">
            <text:p>0.403225806451613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BP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table:formula="of:=[.D32]/([.D32]+[.E32])" office:value-type="float" office:value="0.0348837209302326" calcext:value-type="float">
            <text:p>0.0348837209302326</text:p>
          </table:table-cell>
          <table:table-cell table:formula="of:=[.D32]/([.D32]+[.F32])" office:value-type="float" office:value="0.107142857142857" calcext:value-type="float">
            <text:p>0.107142857142857</text:p>
          </table:table-cell>
          <table:table-cell table:formula="of:=2*[.I32]*[.J32]/([.I32]+[.J32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intersect</text:p>
          </table:table-cell>
          <table:table-cell office:value-type="float" office:value="1031678" calcext:value-type="float">
            <text:p>1031678</text:p>
          </table:table-cell>
          <table:table-cell office:value-type="float" office:value="1161043199" calcext:value-type="float">
            <text:p>1161043199</text:p>
          </table:table-cell>
          <table:table-cell office:value-type="float" office:value="93126" calcext:value-type="float">
            <text:p>93126</text:p>
          </table:table-cell>
          <table:table-cell table:number-columns-repeated="2" office:value-type="string" calcext:value-type="string">
            <text:p>n</text:p>
          </table:table-cell>
          <table:table-cell table:formula="of:=[.D33]/([.D33]+[.E33])" office:value-type="float" office:value="0.000887789608414364" calcext:value-type="float">
            <text:p>0.000887789608414364</text:p>
          </table:table-cell>
          <table:table-cell table:formula="of:=[.D33]/([.D33]+[.F33])" office:value-type="float" office:value="0.917206908937024" calcext:value-type="float">
            <text:p>0.917206908937024</text:p>
          </table:table-cell>
          <table:table-cell table:formula="of:=2*[.I33]*[.J33]/([.I33]+[.J33])" office:value-type="float" office:value="0.00177386224713038" calcext:value-type="float">
            <text:p>0.00177386224713038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gene</text:p>
          </table:table-cell>
          <table:table-cell office:value-type="float" office:value="30" calcext:value-type="float">
            <text:p>3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formula="of:=[.D34]/([.D34]+[.E34])" office:value-type="float" office:value="0.0817438692098093" calcext:value-type="float">
            <text:p>0.0817438692098093</text:p>
          </table:table-cell>
          <table:table-cell table:formula="of:=[.D34]/([.D34]+[.F34])" office:value-type="float" office:value="1" calcext:value-type="float">
            <text:p>1</text:p>
          </table:table-cell>
          <table:table-cell table:formula="of:=2*[.I34]*[.J34]/([.I34]+[.J34])" office:value-type="float" office:value="0.151133501259446" calcext:value-type="float">
            <text:p>0.151133501259446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event</text:p>
          </table:table-cell>
          <table:table-cell office:value-type="float" office:value="551" calcext:value-type="float">
            <text:p>551</text:p>
          </table:table-cell>
          <table:table-cell office:value-type="float" office:value="3903" calcext:value-type="float">
            <text:p>3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formula="of:=[.D35]/([.D35]+[.E35])" office:value-type="float" office:value="0.123709025594971" calcext:value-type="float">
            <text:p>0.123709025594971</text:p>
          </table:table-cell>
          <table:table-cell table:formula="of:=[.D35]/([.D35]+[.F35])" office:value-type="float" office:value="1" calcext:value-type="float">
            <text:p>1</text:p>
          </table:table-cell>
          <table:table-cell table:formula="of:=2*[.I35]*[.J35]/([.I35]+[.J35])" office:value-type="float" office:value="0.22017982017982" calcext:value-type="float">
            <text:p>0.22017982017982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BP</text:p>
          </table:table-cell>
          <table:table-cell office:value-type="float" office:value="57" calcext:value-type="float">
            <text:p>57</text:p>
          </table:table-cell>
          <table:table-cell office:value-type="float" office:value="8743" calcext:value-type="float">
            <text:p>87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formula="of:=[.D36]/([.D36]+[.E36])" office:value-type="float" office:value="0.00647727272727273" calcext:value-type="float">
            <text:p>0.00647727272727273</text:p>
          </table:table-cell>
          <table:table-cell table:formula="of:=[.D36]/([.D36]+[.F36])" office:value-type="float" office:value="0.982758620689655" calcext:value-type="float">
            <text:p>0.982758620689655</text:p>
          </table:table-cell>
          <table:table-cell table:formula="of:=2*[.I36]*[.J36]/([.I36]+[.J36])" office:value-type="float" office:value="0.0128697222849402" calcext:value-type="float">
            <text:p>0.0128697222849402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intersect</text:p>
          </table:table-cell>
          <table:table-cell office:value-type="float" office:value="158670" calcext:value-type="float">
            <text:p>158670</text:p>
          </table:table-cell>
          <table:table-cell office:value-type="float" office:value="1014654" calcext:value-type="float">
            <text:p>10146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formula="of:=[.D37]/([.D37]+[.E37])" office:value-type="float" office:value="0.135231189339006" calcext:value-type="float">
            <text:p>0.135231189339006</text:p>
          </table:table-cell>
          <table:table-cell table:formula="of:=[.D37]/([.D37]+[.F37])" office:value-type="float" office:value="1" calcext:value-type="float">
            <text:p>1</text:p>
          </table:table-cell>
          <table:table-cell table:formula="of:=2*[.I37]*[.J37]/([.I37]+[.J37])" office:value-type="float" office:value="0.23824431641584" calcext:value-type="float">
            <text:p>0.23824431641584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gene</text:p>
          </table:table-cell>
          <table:table-cell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38]/([.D38]+[.E38])" office:value-type="float" office:value="0.169934640522876" calcext:value-type="float">
            <text:p>0.169934640522876</text:p>
          </table:table-cell>
          <table:table-cell table:formula="of:=[.D38]/([.D38]+[.F38])" office:value-type="float" office:value="0.896551724137931" calcext:value-type="float">
            <text:p>0.896551724137931</text:p>
          </table:table-cell>
          <table:table-cell table:formula="of:=2*[.I38]*[.J38]/([.I38]+[.J38])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event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39]/([.D39]+[.E39])" office:value-type="float" office:value="0.306930693069307" calcext:value-type="float">
            <text:p>0.306930693069307</text:p>
          </table:table-cell>
          <table:table-cell table:formula="of:=[.D39]/([.D39]+[.F39])" office:value-type="float" office:value="1" calcext:value-type="float">
            <text:p>1</text:p>
          </table:table-cell>
          <table:table-cell table:formula="of:=2*[.I39]*[.J39]/([.I39]+[.J39])" office:value-type="float" office:value="0.46969696969697" calcext:value-type="float">
            <text:p>0.46969696969697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BP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0]/([.D40]+[.E40])" office:value-type="float" office:value="0.0437956204379562" calcext:value-type="float">
            <text:p>0.0437956204379562</text:p>
          </table:table-cell>
          <table:table-cell table:formula="of:=[.D40]/([.D40]+[.F40])" office:value-type="float" office:value="0.109090909090909" calcext:value-type="float">
            <text:p>0.109090909090909</text:p>
          </table:table-cell>
          <table:table-cell table:formula="of:=2*[.I40]*[.J40]/([.I40]+[.J40])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intersect</text:p>
          </table:table-cell>
          <table:table-cell office:value-type="float" office:value="1639643" calcext:value-type="float">
            <text:p>1639643</text:p>
          </table:table-cell>
          <table:table-cell office:value-type="float" office:value="656864751" calcext:value-type="float">
            <text:p>656864751</text:p>
          </table:table-cell>
          <table:table-cell office:value-type="float" office:value="107173" calcext:value-type="float">
            <text:p>1071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1]/([.D41]+[.E41])" office:value-type="float" office:value="0.00248994997594504" calcext:value-type="float">
            <text:p>0.00248994997594504</text:p>
          </table:table-cell>
          <table:table-cell table:formula="of:=[.D41]/([.D41]+[.F41])" office:value-type="float" office:value="0.938646657690335" calcext:value-type="float">
            <text:p>0.938646657690335</text:p>
          </table:table-cell>
          <table:table-cell table:formula="of:=2*[.I41]*[.J41]/([.I41]+[.J41])" office:value-type="float" office:value="0.00496672471073548" calcext:value-type="float">
            <text:p>0.00496672471073548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gene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2]/([.D42]+[.E42])" office:value-type="float" office:value="0.125" calcext:value-type="float">
            <text:p>0.125</text:p>
          </table:table-cell>
          <table:table-cell table:formula="of:=[.D42]/([.D42]+[.F42])" office:value-type="float" office:value="0.806451612903226" calcext:value-type="float">
            <text:p>0.806451612903226</text:p>
          </table:table-cell>
          <table:table-cell table:formula="of:=2*[.I42]*[.J42]/([.I42]+[.J42])" office:value-type="float" office:value="0.216450216450216" calcext:value-type="float">
            <text:p>0.216450216450216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event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3]/([.D43]+[.E43])" office:value-type="float" office:value="0.274193548387097" calcext:value-type="float">
            <text:p>0.274193548387097</text:p>
          </table:table-cell>
          <table:table-cell table:formula="of:=[.D43]/([.D43]+[.F43])" office:value-type="float" office:value="0.918918918918919" calcext:value-type="float">
            <text:p>0.918918918918919</text:p>
          </table:table-cell>
          <table:table-cell table:formula="of:=2*[.I43]*[.J43]/([.I43]+[.J43])" office:value-type="float" office:value="0.422360248447205" calcext:value-type="float">
            <text:p>0.422360248447205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BP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4]/([.D44]+[.E44])" office:value-type="float" office:value="0.0277777777777778" calcext:value-type="float">
            <text:p>0.0277777777777778</text:p>
          </table:table-cell>
          <table:table-cell table:formula="of:=[.D44]/([.D44]+[.F44])" office:value-type="float" office:value="0.107142857142857" calcext:value-type="float">
            <text:p>0.107142857142857</text:p>
          </table:table-cell>
          <table:table-cell table:formula="of:=2*[.I44]*[.J44]/([.I44]+[.J44])" office:value-type="float" office:value="0.0441176470588235" calcext:value-type="float">
            <text:p>0.0441176470588235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intersect</text:p>
          </table:table-cell>
          <table:table-cell office:value-type="float" office:value="1210289" calcext:value-type="float">
            <text:p>1210289</text:p>
          </table:table-cell>
          <table:table-cell office:value-type="float" office:value="957099854" calcext:value-type="float">
            <text:p>957099854</text:p>
          </table:table-cell>
          <table:table-cell office:value-type="float" office:value="418527" calcext:value-type="float">
            <text:p>4185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5]/([.D45]+[.E45])" office:value-type="float" office:value="0.00126294082228033" calcext:value-type="float">
            <text:p>0.00126294082228033</text:p>
          </table:table-cell>
          <table:table-cell table:formula="of:=[.D45]/([.D45]+[.F45])" office:value-type="float" office:value="0.743048324672646" calcext:value-type="float">
            <text:p>0.743048324672646</text:p>
          </table:table-cell>
          <table:table-cell table:formula="of:=2*[.I45]*[.J45]/([.I45]+[.J45])" office:value-type="float" office:value="0.00252159575075648" calcext:value-type="float">
            <text:p>0.00252159575075648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gene</text:p>
          </table:table-cell>
          <table:table-cell office:value-type="float" office:value="30" calcext:value-type="float">
            <text:p>3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6]/([.D46]+[.E46])" office:value-type="float" office:value="0.0819672131147541" calcext:value-type="float">
            <text:p>0.0819672131147541</text:p>
          </table:table-cell>
          <table:table-cell table:formula="of:=[.D46]/([.D46]+[.F46])" office:value-type="float" office:value="1" calcext:value-type="float">
            <text:p>1</text:p>
          </table:table-cell>
          <table:table-cell table:formula="of:=2*[.I46]*[.J46]/([.I46]+[.J46])" office:value-type="float" office:value="0.151515151515152" calcext:value-type="float">
            <text:p>0.151515151515152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event</text:p>
          </table:table-cell>
          <table:table-cell office:value-type="float" office:value="550" calcext:value-type="float">
            <text:p>550</text:p>
          </table:table-cell>
          <table:table-cell office:value-type="float" office:value="3645" calcext:value-type="float">
            <text:p>3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7]/([.D47]+[.E47])" office:value-type="float" office:value="0.131108462455304" calcext:value-type="float">
            <text:p>0.131108462455304</text:p>
          </table:table-cell>
          <table:table-cell table:formula="of:=[.D47]/([.D47]+[.F47])" office:value-type="float" office:value="1" calcext:value-type="float">
            <text:p>1</text:p>
          </table:table-cell>
          <table:table-cell table:formula="of:=2*[.I47]*[.J47]/([.I47]+[.J47])" office:value-type="float" office:value="0.231822971548999" calcext:value-type="float">
            <text:p>0.231822971548999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BP</text:p>
          </table:table-cell>
          <table:table-cell office:value-type="float" office:value="57" calcext:value-type="float">
            <text:p>57</text:p>
          </table:table-cell>
          <table:table-cell office:value-type="float" office:value="8236" calcext:value-type="float">
            <text:p>8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8]/([.D48]+[.E48])" office:value-type="float" office:value="0.00687326661039431" calcext:value-type="float">
            <text:p>0.00687326661039431</text:p>
          </table:table-cell>
          <table:table-cell table:formula="of:=[.D48]/([.D48]+[.F48])" office:value-type="float" office:value="0.982758620689655" calcext:value-type="float">
            <text:p>0.982758620689655</text:p>
          </table:table-cell>
          <table:table-cell table:formula="of:=2*[.I48]*[.J48]/([.I48]+[.J48])" office:value-type="float" office:value="0.013651059753323" calcext:value-type="float">
            <text:p>0.013651059753323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intersect</text:p>
          </table:table-cell>
          <table:table-cell office:value-type="float" office:value="158479" calcext:value-type="float">
            <text:p>158479</text:p>
          </table:table-cell>
          <table:table-cell office:value-type="float" office:value="965242" calcext:value-type="float">
            <text:p>965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49]/([.D49]+[.E49])" office:value-type="float" office:value="0.141030558296944" calcext:value-type="float">
            <text:p>0.141030558296944</text:p>
          </table:table-cell>
          <table:table-cell table:formula="of:=[.D49]/([.D49]+[.F49])" office:value-type="float" office:value="1" calcext:value-type="float">
            <text:p>1</text:p>
          </table:table-cell>
          <table:table-cell table:formula="of:=2*[.I49]*[.J49]/([.I49]+[.J49])" office:value-type="float" office:value="0.247198564966464" calcext:value-type="float">
            <text:p>0.247198564966464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gen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50]/([.D50]+[.E50])" office:value-type="float" office:value="0.666666666666667" calcext:value-type="float">
            <text:p>0.666666666666667</text:p>
          </table:table-cell>
          <table:table-cell table:formula="of:=[.D50]/([.D50]+[.F50])" office:value-type="float" office:value="0.25" calcext:value-type="float">
            <text:p>0.25</text:p>
          </table:table-cell>
          <table:table-cell table:formula="of:=2*[.I50]*[.J50]/([.I50]+[.J50])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even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51]/([.D51]+[.E51])" office:value-type="float" office:value="0.777777777777778" calcext:value-type="float">
            <text:p>0.777777777777778</text:p>
          </table:table-cell>
          <table:table-cell table:formula="of:=[.D51]/([.D51]+[.F51])" office:value-type="float" office:value="0.28" calcext:value-type="float">
            <text:p>0.28</text:p>
          </table:table-cell>
          <table:table-cell table:formula="of:=2*[.I51]*[.J51]/([.I51]+[.J51])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B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52]/([.D52]+[.E52])" office:value-type="float" office:value="0.416666666666667" calcext:value-type="float">
            <text:p>0.416666666666667</text:p>
          </table:table-cell>
          <table:table-cell table:formula="of:=[.D52]/([.D52]+[.F52])" office:value-type="float" office:value="0.104166666666667" calcext:value-type="float">
            <text:p>0.104166666666667</text:p>
          </table:table-cell>
          <table:table-cell table:formula="of:=2*[.I52]*[.J52]/([.I52]+[.J52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intersect</text:p>
          </table:table-cell>
          <table:table-cell office:value-type="float" office:value="308231" calcext:value-type="float">
            <text:p>308231</text:p>
          </table:table-cell>
          <table:table-cell office:value-type="float" office:value="23215" calcext:value-type="float">
            <text:p>23215</text:p>
          </table:table-cell>
          <table:table-cell office:value-type="float" office:value="1643401" calcext:value-type="float">
            <text:p>16434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53]/([.D53]+[.E53])" office:value-type="float" office:value="0.929958424600086" calcext:value-type="float">
            <text:p>0.929958424600086</text:p>
          </table:table-cell>
          <table:table-cell table:formula="of:=[.D53]/([.D53]+[.F53])" office:value-type="float" office:value="0.157935000040991" calcext:value-type="float">
            <text:p>0.157935000040991</text:p>
          </table:table-cell>
          <table:table-cell table:formula="of:=2*[.I53]*[.J53]/([.I53]+[.J53])" office:value-type="float" office:value="0.2700135518804" calcext:value-type="float">
            <text:p>0.2700135518804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gen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y</text:p>
          </table:table-cell>
          <table:table-cell table:formula="of:=[.D54]/([.D54]+[.E54])" office:value-type="float" office:value="0.666666666666667" calcext:value-type="float">
            <text:p>0.666666666666667</text:p>
          </table:table-cell>
          <table:table-cell table:formula="of:=[.D54]/([.D54]+[.F54])" office:value-type="float" office:value="0.25" calcext:value-type="float">
            <text:p>0.25</text:p>
          </table:table-cell>
          <table:table-cell table:formula="of:=2*[.I54]*[.J54]/([.I54]+[.J54])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even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y</text:p>
          </table:table-cell>
          <table:table-cell table:formula="of:=[.D55]/([.D55]+[.E55])" office:value-type="float" office:value="0.777777777777778" calcext:value-type="float">
            <text:p>0.777777777777778</text:p>
          </table:table-cell>
          <table:table-cell table:formula="of:=[.D55]/([.D55]+[.F55])" office:value-type="float" office:value="0.28" calcext:value-type="float">
            <text:p>0.28</text:p>
          </table:table-cell>
          <table:table-cell table:formula="of:=2*[.I55]*[.J55]/([.I55]+[.J55])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B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y</text:p>
          </table:table-cell>
          <table:table-cell table:formula="of:=[.D56]/([.D56]+[.E56])" office:value-type="float" office:value="0.416666666666667" calcext:value-type="float">
            <text:p>0.416666666666667</text:p>
          </table:table-cell>
          <table:table-cell table:formula="of:=[.D56]/([.D56]+[.F56])" office:value-type="float" office:value="0.104166666666667" calcext:value-type="float">
            <text:p>0.104166666666667</text:p>
          </table:table-cell>
          <table:table-cell table:formula="of:=2*[.I56]*[.J56]/([.I56]+[.J56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batch1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intersect</text:p>
          </table:table-cell>
          <table:table-cell office:value-type="float" office:value="308231" calcext:value-type="float">
            <text:p>308231</text:p>
          </table:table-cell>
          <table:table-cell office:value-type="float" office:value="23215" calcext:value-type="float">
            <text:p>23215</text:p>
          </table:table-cell>
          <table:table-cell office:value-type="float" office:value="1643401" calcext:value-type="float">
            <text:p>1643401</text:p>
          </table:table-cell>
          <table:table-cell table:number-columns-repeated="2" office:value-type="string" calcext:value-type="string">
            <text:p>y</text:p>
          </table:table-cell>
          <table:table-cell table:formula="of:=[.D57]/([.D57]+[.E57])" office:value-type="float" office:value="0.929958424600086" calcext:value-type="float">
            <text:p>0.929958424600086</text:p>
          </table:table-cell>
          <table:table-cell table:formula="of:=[.D57]/([.D57]+[.F57])" office:value-type="float" office:value="0.157935000040991" calcext:value-type="float">
            <text:p>0.157935000040991</text:p>
          </table:table-cell>
          <table:table-cell table:formula="of:=2*[.I57]*[.J57]/([.I57]+[.J57])" office:value-type="float" office:value="0.2700135518804" calcext:value-type="float">
            <text:p>0.2700135518804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gen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</text:p>
          </table:table-cell>
          <table:table-cell table:formula="of:=[.D58]/([.D58]+[.E58])" office:value-type="float" office:value="0.611111111111111" calcext:value-type="float">
            <text:p>0.611111111111111</text:p>
          </table:table-cell>
          <table:table-cell table:formula="of:=[.D58]/([.D58]+[.F58])" office:value-type="float" office:value="0.379310344827586" calcext:value-type="float">
            <text:p>0.379310344827586</text:p>
          </table:table-cell>
          <table:table-cell table:formula="of:=2*[.I58]*[.J58]/([.I58]+[.J58])" office:value-type="float" office:value="0.468085106382979" calcext:value-type="float">
            <text:p>0.468085106382979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event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table:formula="of:=[.D59]/([.D59]+[.E59])" office:value-type="float" office:value="0.611111111111111" calcext:value-type="float">
            <text:p>0.611111111111111</text:p>
          </table:table-cell>
          <table:table-cell table:formula="of:=[.D59]/([.D59]+[.F59])" office:value-type="float" office:value="0.354838709677419" calcext:value-type="float">
            <text:p>0.354838709677419</text:p>
          </table:table-cell>
          <table:table-cell table:formula="of:=2*[.I59]*[.J59]/([.I59]+[.J59])" office:value-type="float" office:value="0.448979591836735" calcext:value-type="float">
            <text:p>0.448979591836735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BP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</text:p>
          </table:table-cell>
          <table:table-cell table:formula="of:=[.D60]/([.D60]+[.E60])" office:value-type="float" office:value="0.304347826086957" calcext:value-type="float">
            <text:p>0.304347826086957</text:p>
          </table:table-cell>
          <table:table-cell table:formula="of:=[.D60]/([.D60]+[.F60])" office:value-type="float" office:value="0.125" calcext:value-type="float">
            <text:p>0.125</text:p>
          </table:table-cell>
          <table:table-cell table:formula="of:=2*[.I60]*[.J60]/([.I60]+[.J60])" office:value-type="float" office:value="0.177215189873418" calcext:value-type="float">
            <text:p>0.177215189873418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intersect</text:p>
          </table:table-cell>
          <table:table-cell office:value-type="float" office:value="735529" calcext:value-type="float">
            <text:p>735529</text:p>
          </table:table-cell>
          <table:table-cell office:value-type="float" office:value="69867" calcext:value-type="float">
            <text:p>69867</text:p>
          </table:table-cell>
          <table:table-cell office:value-type="float" office:value="1271414" calcext:value-type="float">
            <text:p>1271414</text:p>
          </table:table-cell>
          <table:table-cell table:number-columns-repeated="2" office:value-type="string" calcext:value-type="string">
            <text:p>n</text:p>
          </table:table-cell>
          <table:table-cell table:formula="of:=[.D61]/([.D61]+[.E61])" office:value-type="float" office:value="0.913251369512637" calcext:value-type="float">
            <text:p>0.913251369512637</text:p>
          </table:table-cell>
          <table:table-cell table:formula="of:=[.D61]/([.D61]+[.F61])" office:value-type="float" office:value="0.366492222250457" calcext:value-type="float">
            <text:p>0.366492222250457</text:p>
          </table:table-cell>
          <table:table-cell table:formula="of:=2*[.I61]*[.J61]/([.I61]+[.J61])" office:value-type="float" office:value="0.523072787455566" calcext:value-type="float">
            <text:p>0.523072787455566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gen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62]/([.D62]+[.E62])" office:value-type="float" office:value="0.611111111111111" calcext:value-type="float">
            <text:p>0.611111111111111</text:p>
          </table:table-cell>
          <table:table-cell table:formula="of:=[.D62]/([.D62]+[.F62])" office:value-type="float" office:value="0.379310344827586" calcext:value-type="float">
            <text:p>0.379310344827586</text:p>
          </table:table-cell>
          <table:table-cell table:formula="of:=2*[.I62]*[.J62]/([.I62]+[.J62])" office:value-type="float" office:value="0.468085106382979" calcext:value-type="float">
            <text:p>0.468085106382979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eve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63]/([.D63]+[.E63])" office:value-type="float" office:value="0.588235294117647" calcext:value-type="float">
            <text:p>0.588235294117647</text:p>
          </table:table-cell>
          <table:table-cell table:formula="of:=[.D63]/([.D63]+[.F63])" office:value-type="float" office:value="0.333333333333333" calcext:value-type="float">
            <text:p>0.333333333333333</text:p>
          </table:table-cell>
          <table:table-cell table:formula="of:=2*[.I63]*[.J63]/([.I63]+[.J63])" office:value-type="float" office:value="0.425531914893617" calcext:value-type="float">
            <text:p>0.425531914893617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B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64]/([.D64]+[.E64])" office:value-type="float" office:value="0.347826086956522" calcext:value-type="float">
            <text:p>0.347826086956522</text:p>
          </table:table-cell>
          <table:table-cell table:formula="of:=[.D64]/([.D64]+[.F64])" office:value-type="float" office:value="0.142857142857143" calcext:value-type="float">
            <text:p>0.142857142857143</text:p>
          </table:table-cell>
          <table:table-cell table:formula="of:=2*[.I64]*[.J64]/([.I64]+[.J64])" office:value-type="float" office:value="0.20253164556962" calcext:value-type="float">
            <text:p>0.20253164556962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intersect</text:p>
          </table:table-cell>
          <table:table-cell office:value-type="float" office:value="774008" calcext:value-type="float">
            <text:p>774008</text:p>
          </table:table-cell>
          <table:table-cell office:value-type="float" office:value="69867" calcext:value-type="float">
            <text:p>69867</text:p>
          </table:table-cell>
          <table:table-cell office:value-type="float" office:value="1271414" calcext:value-type="float">
            <text:p>12714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[.D65]/([.D65]+[.E65])" office:value-type="float" office:value="0.917206932306325" calcext:value-type="float">
            <text:p>0.917206932306325</text:p>
          </table:table-cell>
          <table:table-cell table:formula="of:=[.D65]/([.D65]+[.F65])" office:value-type="float" office:value="0.378409932033585" calcext:value-type="float">
            <text:p>0.378409932033585</text:p>
          </table:table-cell>
          <table:table-cell table:formula="of:=2*[.I65]*[.J65]/([.I65]+[.J65])" office:value-type="float" office:value="0.535776003643793" calcext:value-type="float">
            <text:p>0.535776003643793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gene</text:p>
          </table:table-cell>
          <table:table-cell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table:formula="of:=[.D66]/([.D66]+[.E66])" office:value-type="float" office:value="0.169934640522876" calcext:value-type="float">
            <text:p>0.169934640522876</text:p>
          </table:table-cell>
          <table:table-cell table:formula="of:=[.D66]/([.D66]+[.F66])" office:value-type="float" office:value="0.896551724137931" calcext:value-type="float">
            <text:p>0.896551724137931</text:p>
          </table:table-cell>
          <table:table-cell table:formula="of:=2*[.I66]*[.J66]/([.I66]+[.J66])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event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table:formula="of:=[.D67]/([.D67]+[.E67])" office:value-type="float" office:value="0.306930693069307" calcext:value-type="float">
            <text:p>0.306930693069307</text:p>
          </table:table-cell>
          <table:table-cell table:formula="of:=[.D67]/([.D67]+[.F67])" office:value-type="float" office:value="1" calcext:value-type="float">
            <text:p>1</text:p>
          </table:table-cell>
          <table:table-cell table:formula="of:=2*[.I67]*[.J67]/([.I67]+[.J67])" office:value-type="float" office:value="0.46969696969697" calcext:value-type="float">
            <text:p>0.46969696969697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BP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y</text:p>
          </table:table-cell>
          <table:table-cell table:formula="of:=[.D68]/([.D68]+[.E68])" office:value-type="float" office:value="0.0437956204379562" calcext:value-type="float">
            <text:p>0.0437956204379562</text:p>
          </table:table-cell>
          <table:table-cell table:formula="of:=[.D68]/([.D68]+[.F68])" office:value-type="float" office:value="0.109090909090909" calcext:value-type="float">
            <text:p>0.109090909090909</text:p>
          </table:table-cell>
          <table:table-cell table:formula="of:=2*[.I68]*[.J68]/([.I68]+[.J68])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intersect</text:p>
          </table:table-cell>
          <table:table-cell office:value-type="float" office:value="1639643" calcext:value-type="float">
            <text:p>1639643</text:p>
          </table:table-cell>
          <table:table-cell office:value-type="float" office:value="656864751" calcext:value-type="float">
            <text:p>656864751</text:p>
          </table:table-cell>
          <table:table-cell office:value-type="float" office:value="107173" calcext:value-type="float">
            <text:p>107173</text:p>
          </table:table-cell>
          <table:table-cell table:number-columns-repeated="2" office:value-type="string" calcext:value-type="string">
            <text:p>y</text:p>
          </table:table-cell>
          <table:table-cell table:formula="of:=[.D69]/([.D69]+[.E69])" office:value-type="float" office:value="0.00248994997594504" calcext:value-type="float">
            <text:p>0.00248994997594504</text:p>
          </table:table-cell>
          <table:table-cell table:formula="of:=[.D69]/([.D69]+[.F69])" office:value-type="float" office:value="0.938646657690335" calcext:value-type="float">
            <text:p>0.938646657690335</text:p>
          </table:table-cell>
          <table:table-cell table:formula="of:=2*[.I69]*[.J69]/([.I69]+[.J69])" office:value-type="float" office:value="0.00496672471073548" calcext:value-type="float">
            <text:p>0.00496672471073548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gene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formula="of:=[.D70]/([.D70]+[.E70])" office:value-type="float" office:value="0.125" calcext:value-type="float">
            <text:p>0.125</text:p>
          </table:table-cell>
          <table:table-cell table:formula="of:=[.D70]/([.D70]+[.F70])" office:value-type="float" office:value="0.806451612903226" calcext:value-type="float">
            <text:p>0.806451612903226</text:p>
          </table:table-cell>
          <table:table-cell table:formula="of:=2*[.I70]*[.J70]/([.I70]+[.J70])" office:value-type="float" office:value="0.216450216450216" calcext:value-type="float">
            <text:p>0.216450216450216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event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table:formula="of:=[.D71]/([.D71]+[.E71])" office:value-type="float" office:value="0.274193548387097" calcext:value-type="float">
            <text:p>0.274193548387097</text:p>
          </table:table-cell>
          <table:table-cell table:formula="of:=[.D71]/([.D71]+[.F71])" office:value-type="float" office:value="0.918918918918919" calcext:value-type="float">
            <text:p>0.918918918918919</text:p>
          </table:table-cell>
          <table:table-cell table:formula="of:=2*[.I71]*[.J71]/([.I71]+[.J71])" office:value-type="float" office:value="0.422360248447205" calcext:value-type="float">
            <text:p>0.422360248447205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BP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</text:p>
          </table:table-cell>
          <table:table-cell table:formula="of:=[.D72]/([.D72]+[.E72])" office:value-type="float" office:value="0.0277777777777778" calcext:value-type="float">
            <text:p>0.0277777777777778</text:p>
          </table:table-cell>
          <table:table-cell table:formula="of:=[.D72]/([.D72]+[.F72])" office:value-type="float" office:value="0.107142857142857" calcext:value-type="float">
            <text:p>0.107142857142857</text:p>
          </table:table-cell>
          <table:table-cell table:formula="of:=2*[.I72]*[.J72]/([.I72]+[.J72])" office:value-type="float" office:value="0.0441176470588235" calcext:value-type="float">
            <text:p>0.0441176470588235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intersect</text:p>
          </table:table-cell>
          <table:table-cell office:value-type="float" office:value="1210289" calcext:value-type="float">
            <text:p>1210289</text:p>
          </table:table-cell>
          <table:table-cell office:value-type="float" office:value="957099854" calcext:value-type="float">
            <text:p>957099854</text:p>
          </table:table-cell>
          <table:table-cell office:value-type="float" office:value="418527" calcext:value-type="float">
            <text:p>418527</text:p>
          </table:table-cell>
          <table:table-cell table:number-columns-repeated="2" office:value-type="string" calcext:value-type="string">
            <text:p>y</text:p>
          </table:table-cell>
          <table:table-cell table:formula="of:=[.D73]/([.D73]+[.E73])" office:value-type="float" office:value="0.00126294082228033" calcext:value-type="float">
            <text:p>0.00126294082228033</text:p>
          </table:table-cell>
          <table:table-cell table:formula="of:=[.D73]/([.D73]+[.F73])" office:value-type="float" office:value="0.743048324672646" calcext:value-type="float">
            <text:p>0.743048324672646</text:p>
          </table:table-cell>
          <table:table-cell table:formula="of:=2*[.I73]*[.J73]/([.I73]+[.J73])" office:value-type="float" office:value="0.00252159575075648" calcext:value-type="float">
            <text:p>0.00252159575075648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gene</text:p>
          </table:table-cell>
          <table:table-cell office:value-type="float" office:value="30" calcext:value-type="float">
            <text:p>3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table:formula="of:=[.D74]/([.D74]+[.E74])" office:value-type="float" office:value="0.0819672131147541" calcext:value-type="float">
            <text:p>0.0819672131147541</text:p>
          </table:table-cell>
          <table:table-cell table:formula="of:=[.D74]/([.D74]+[.F74])" office:value-type="float" office:value="1" calcext:value-type="float">
            <text:p>1</text:p>
          </table:table-cell>
          <table:table-cell table:formula="of:=2*[.I74]*[.J74]/([.I74]+[.J74])" office:value-type="float" office:value="0.151515151515152" calcext:value-type="float">
            <text:p>0.151515151515152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event</text:p>
          </table:table-cell>
          <table:table-cell office:value-type="float" office:value="550" calcext:value-type="float">
            <text:p>550</text:p>
          </table:table-cell>
          <table:table-cell office:value-type="float" office:value="3645" calcext:value-type="float">
            <text:p>36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table:formula="of:=[.D75]/([.D75]+[.E75])" office:value-type="float" office:value="0.131108462455304" calcext:value-type="float">
            <text:p>0.131108462455304</text:p>
          </table:table-cell>
          <table:table-cell table:formula="of:=[.D75]/([.D75]+[.F75])" office:value-type="float" office:value="1" calcext:value-type="float">
            <text:p>1</text:p>
          </table:table-cell>
          <table:table-cell table:formula="of:=2*[.I75]*[.J75]/([.I75]+[.J75])" office:value-type="float" office:value="0.231822971548999" calcext:value-type="float">
            <text:p>0.231822971548999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BP</text:p>
          </table:table-cell>
          <table:table-cell office:value-type="float" office:value="57" calcext:value-type="float">
            <text:p>57</text:p>
          </table:table-cell>
          <table:table-cell office:value-type="float" office:value="8236" calcext:value-type="float">
            <text:p>8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table:formula="of:=[.D76]/([.D76]+[.E76])" office:value-type="float" office:value="0.00687326661039431" calcext:value-type="float">
            <text:p>0.00687326661039431</text:p>
          </table:table-cell>
          <table:table-cell table:formula="of:=[.D76]/([.D76]+[.F76])" office:value-type="float" office:value="0.982758620689655" calcext:value-type="float">
            <text:p>0.982758620689655</text:p>
          </table:table-cell>
          <table:table-cell table:formula="of:=2*[.I76]*[.J76]/([.I76]+[.J76])" office:value-type="float" office:value="0.013651059753323" calcext:value-type="float">
            <text:p>0.013651059753323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intersect</text:p>
          </table:table-cell>
          <table:table-cell office:value-type="float" office:value="158479" calcext:value-type="float">
            <text:p>158479</text:p>
          </table:table-cell>
          <table:table-cell office:value-type="float" office:value="965242" calcext:value-type="float">
            <text:p>965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table:formula="of:=[.D77]/([.D77]+[.E77])" office:value-type="float" office:value="0.141030558296944" calcext:value-type="float">
            <text:p>0.141030558296944</text:p>
          </table:table-cell>
          <table:table-cell table:formula="of:=[.D77]/([.D77]+[.F77])" office:value-type="float" office:value="1" calcext:value-type="float">
            <text:p>1</text:p>
          </table:table-cell>
          <table:table-cell table:formula="of:=2*[.I77]*[.J77]/([.I77]+[.J77])" office:value-type="float" office:value="0.247198564966464" calcext:value-type="float">
            <text:p>0.247198564966464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gen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y</text:p>
          </table:table-cell>
          <table:table-cell table:formula="of:=[.D78]/([.D78]+[.E78])" office:value-type="float" office:value="0.611111111111111" calcext:value-type="float">
            <text:p>0.611111111111111</text:p>
          </table:table-cell>
          <table:table-cell table:formula="of:=[.D78]/([.D78]+[.F78])" office:value-type="float" office:value="0.379310344827586" calcext:value-type="float">
            <text:p>0.379310344827586</text:p>
          </table:table-cell>
          <table:table-cell table:formula="of:=2*[.I78]*[.J78]/([.I78]+[.J78])" office:value-type="float" office:value="0.468085106382979" calcext:value-type="float">
            <text:p>0.468085106382979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eve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</text:p>
          </table:table-cell>
          <table:table-cell table:formula="of:=[.D79]/([.D79]+[.E79])" office:value-type="float" office:value="0.588235294117647" calcext:value-type="float">
            <text:p>0.588235294117647</text:p>
          </table:table-cell>
          <table:table-cell table:formula="of:=[.D79]/([.D79]+[.F79])" office:value-type="float" office:value="0.333333333333333" calcext:value-type="float">
            <text:p>0.333333333333333</text:p>
          </table:table-cell>
          <table:table-cell table:formula="of:=2*[.I79]*[.J79]/([.I79]+[.J79])" office:value-type="float" office:value="0.425531914893617" calcext:value-type="float">
            <text:p>0.425531914893617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B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y</text:p>
          </table:table-cell>
          <table:table-cell table:formula="of:=[.D80]/([.D80]+[.E80])" office:value-type="float" office:value="0.347826086956522" calcext:value-type="float">
            <text:p>0.347826086956522</text:p>
          </table:table-cell>
          <table:table-cell table:formula="of:=[.D80]/([.D80]+[.F80])" office:value-type="float" office:value="0.142857142857143" calcext:value-type="float">
            <text:p>0.142857142857143</text:p>
          </table:table-cell>
          <table:table-cell table:formula="of:=2*[.I80]*[.J80]/([.I80]+[.J80])" office:value-type="float" office:value="0.20253164556962" calcext:value-type="float">
            <text:p>0.20253164556962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intersect</text:p>
          </table:table-cell>
          <table:table-cell office:value-type="float" office:value="774008" calcext:value-type="float">
            <text:p>774008</text:p>
          </table:table-cell>
          <table:table-cell office:value-type="float" office:value="69867" calcext:value-type="float">
            <text:p>69867</text:p>
          </table:table-cell>
          <table:table-cell office:value-type="float" office:value="1271414" calcext:value-type="float">
            <text:p>1271414</text:p>
          </table:table-cell>
          <table:table-cell table:number-columns-repeated="2" office:value-type="string" calcext:value-type="string">
            <text:p>y</text:p>
          </table:table-cell>
          <table:table-cell table:formula="of:=[.D81]/([.D81]+[.E81])" office:value-type="float" office:value="0.917206932306325" calcext:value-type="float">
            <text:p>0.917206932306325</text:p>
          </table:table-cell>
          <table:table-cell table:formula="of:=[.D81]/([.D81]+[.F81])" office:value-type="float" office:value="0.378409932033585" calcext:value-type="float">
            <text:p>0.378409932033585</text:p>
          </table:table-cell>
          <table:table-cell table:formula="of:=2*[.I81]*[.J81]/([.I81]+[.J81])" office:value-type="float" office:value="0.535776003643793" calcext:value-type="float">
            <text:p>0.535776003643793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gene</text:p>
          </table:table-cell>
          <table:table-cell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82]/([.D82]+[.E82])" office:value-type="float" office:value="0.141304347826087" calcext:value-type="float">
            <text:p>0.141304347826087</text:p>
          </table:table-cell>
          <table:table-cell table:formula="of:=[.D82]/([.D82]+[.F82])" office:value-type="float" office:value="1" calcext:value-type="float">
            <text:p>1</text:p>
          </table:table-cell>
          <table:table-cell table:formula="of:=2*[.I82]*[.J82]/([.I82]+[.J82])" office:value-type="float" office:value="0.247619047619048" calcext:value-type="float">
            <text:p>0.247619047619048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event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83]/([.D83]+[.E83])" office:value-type="float" office:value="0.336734693877551" calcext:value-type="float">
            <text:p>0.336734693877551</text:p>
          </table:table-cell>
          <table:table-cell table:formula="of:=[.D83]/([.D83]+[.F83])" office:value-type="float" office:value="1" calcext:value-type="float">
            <text:p>1</text:p>
          </table:table-cell>
          <table:table-cell table:formula="of:=2*[.I83]*[.J83]/([.I83]+[.J83])" office:value-type="float" office:value="0.50381679389313" calcext:value-type="float">
            <text:p>0.50381679389313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BP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84]/([.D84]+[.E84])" office:value-type="float" office:value="0.0514705882352941" calcext:value-type="float">
            <text:p>0.0514705882352941</text:p>
          </table:table-cell>
          <table:table-cell table:formula="of:=[.D84]/([.D84]+[.F84])" office:value-type="float" office:value="0.127272727272727" calcext:value-type="float">
            <text:p>0.127272727272727</text:p>
          </table:table-cell>
          <table:table-cell table:formula="of:=2*[.I84]*[.J84]/([.I84]+[.J84])" office:value-type="float" office:value="0.0732984293193717" calcext:value-type="float">
            <text:p>0.0732984293193717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kit</text:p>
          </table:table-cell>
          <table:table-cell office:value-type="string" calcext:value-type="string">
            <text:p>intersect</text:p>
          </table:table-cell>
          <table:table-cell office:value-type="float" office:value="1784243" calcext:value-type="float">
            <text:p>1784243</text:p>
          </table:table-cell>
          <table:table-cell office:value-type="float" office:value="921347667" calcext:value-type="float">
            <text:p>921347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85]/([.D85]+[.E85])" office:value-type="float" office:value="0.00193281478050087" calcext:value-type="float">
            <text:p>0.00193281478050087</text:p>
          </table:table-cell>
          <table:table-cell table:formula="of:=[.D85]/([.D85]+[.F85])" office:value-type="float" office:value="1" calcext:value-type="float">
            <text:p>1</text:p>
          </table:table-cell>
          <table:table-cell table:formula="of:=2*[.I85]*[.J85]/([.I85]+[.J85])" office:value-type="float" office:value="0.00385817242830659" calcext:value-type="float">
            <text:p>0.00385817242830659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gene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86]/([.D86]+[.E86])" office:value-type="float" office:value="0.1" calcext:value-type="float">
            <text:p>0.1</text:p>
          </table:table-cell>
          <table:table-cell table:formula="of:=[.D86]/([.D86]+[.F86])" office:value-type="float" office:value="0.6" calcext:value-type="float">
            <text:p>0.6</text:p>
          </table:table-cell>
          <table:table-cell table:formula="of:=2*[.I86]*[.J86]/([.I86]+[.J86])" office:value-type="float" office:value="0.171428571428571" calcext:value-type="float">
            <text:p>0.171428571428571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event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87]/([.D87]+[.E87])" office:value-type="float" office:value="0.255102040816327" calcext:value-type="float">
            <text:p>0.255102040816327</text:p>
          </table:table-cell>
          <table:table-cell table:formula="of:=[.D87]/([.D87]+[.F87])" office:value-type="float" office:value="0.961538461538462" calcext:value-type="float">
            <text:p>0.961538461538462</text:p>
          </table:table-cell>
          <table:table-cell table:formula="of:=2*[.I87]*[.J87]/([.I87]+[.J87])" office:value-type="float" office:value="0.403225806451613" calcext:value-type="float">
            <text:p>0.403225806451613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BP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88]/([.D88]+[.E88])" office:value-type="float" office:value="0.0348837209302326" calcext:value-type="float">
            <text:p>0.0348837209302326</text:p>
          </table:table-cell>
          <table:table-cell table:formula="of:=[.D88]/([.D88]+[.F88])" office:value-type="float" office:value="0.107142857142857" calcext:value-type="float">
            <text:p>0.107142857142857</text:p>
          </table:table-cell>
          <table:table-cell table:formula="of:=2*[.I88]*[.J88]/([.I88]+[.J88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freec</text:p>
          </table:table-cell>
          <table:table-cell office:value-type="string" calcext:value-type="string">
            <text:p>intersect</text:p>
          </table:table-cell>
          <table:table-cell office:value-type="float" office:value="1031678" calcext:value-type="float">
            <text:p>1031678</text:p>
          </table:table-cell>
          <table:table-cell office:value-type="float" office:value="1161043199" calcext:value-type="float">
            <text:p>1161043199</text:p>
          </table:table-cell>
          <table:table-cell office:value-type="float" office:value="696002" calcext:value-type="float">
            <text:p>6960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89]/([.D89]+[.E89])" office:value-type="float" office:value="0.000887789608414364" calcext:value-type="float">
            <text:p>0.000887789608414364</text:p>
          </table:table-cell>
          <table:table-cell table:formula="of:=[.D89]/([.D89]+[.F89])" office:value-type="float" office:value="0.597146462307835" calcext:value-type="float">
            <text:p>0.597146462307835</text:p>
          </table:table-cell>
          <table:table-cell table:formula="of:=2*[.I89]*[.J89]/([.I89]+[.J89])" office:value-type="float" office:value="0.00177294334643741" calcext:value-type="float">
            <text:p>0.00177294334643741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gene</text:p>
          </table:table-cell>
          <table:table-cell office:value-type="float" office:value="30" calcext:value-type="float">
            <text:p>3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90]/([.D90]+[.E90])" office:value-type="float" office:value="0.0817438692098093" calcext:value-type="float">
            <text:p>0.0817438692098093</text:p>
          </table:table-cell>
          <table:table-cell table:formula="of:=[.D90]/([.D90]+[.F90])" office:value-type="float" office:value="1" calcext:value-type="float">
            <text:p>1</text:p>
          </table:table-cell>
          <table:table-cell table:formula="of:=2*[.I90]*[.J90]/([.I90]+[.J90])" office:value-type="float" office:value="0.151133501259446" calcext:value-type="float">
            <text:p>0.151133501259446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event</text:p>
          </table:table-cell>
          <table:table-cell office:value-type="float" office:value="551" calcext:value-type="float">
            <text:p>551</text:p>
          </table:table-cell>
          <table:table-cell office:value-type="float" office:value="3903" calcext:value-type="float">
            <text:p>3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91]/([.D91]+[.E91])" office:value-type="float" office:value="0.123709025594971" calcext:value-type="float">
            <text:p>0.123709025594971</text:p>
          </table:table-cell>
          <table:table-cell table:formula="of:=[.D91]/([.D91]+[.F91])" office:value-type="float" office:value="1" calcext:value-type="float">
            <text:p>1</text:p>
          </table:table-cell>
          <table:table-cell table:formula="of:=2*[.I91]*[.J91]/([.I91]+[.J91])" office:value-type="float" office:value="0.22017982017982" calcext:value-type="float">
            <text:p>0.22017982017982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BP</text:p>
          </table:table-cell>
          <table:table-cell office:value-type="float" office:value="57" calcext:value-type="float">
            <text:p>57</text:p>
          </table:table-cell>
          <table:table-cell office:value-type="float" office:value="8743" calcext:value-type="float">
            <text:p>87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92]/([.D92]+[.E92])" office:value-type="float" office:value="0.00647727272727273" calcext:value-type="float">
            <text:p>0.00647727272727273</text:p>
          </table:table-cell>
          <table:table-cell table:formula="of:=[.D92]/([.D92]+[.F92])" office:value-type="float" office:value="0.982758620689655" calcext:value-type="float">
            <text:p>0.982758620689655</text:p>
          </table:table-cell>
          <table:table-cell table:formula="of:=2*[.I92]*[.J92]/([.I92]+[.J92])" office:value-type="float" office:value="0.0128697222849402" calcext:value-type="float">
            <text:p>0.0128697222849402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cnv-z</text:p>
          </table:table-cell>
          <table:table-cell office:value-type="string" calcext:value-type="string">
            <text:p>intersect</text:p>
          </table:table-cell>
          <table:table-cell office:value-type="float" office:value="158670" calcext:value-type="float">
            <text:p>158670</text:p>
          </table:table-cell>
          <table:table-cell office:value-type="float" office:value="1014654" calcext:value-type="float">
            <text:p>1014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93]/([.D93]+[.E93])" office:value-type="float" office:value="0.135231189339006" calcext:value-type="float">
            <text:p>0.135231189339006</text:p>
          </table:table-cell>
          <table:table-cell table:formula="of:=[.D93]/([.D93]+[.F93])" office:value-type="float" office:value="1" calcext:value-type="float">
            <text:p>1</text:p>
          </table:table-cell>
          <table:table-cell table:formula="of:=2*[.I93]*[.J93]/([.I93]+[.J93])" office:value-type="float" office:value="0.23824431641584" calcext:value-type="float">
            <text:p>0.23824431641584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gen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94]/([.D94]+[.E94])" office:value-type="float" office:value="0.611111111111111" calcext:value-type="float">
            <text:p>0.611111111111111</text:p>
          </table:table-cell>
          <table:table-cell table:formula="of:=[.D94]/([.D94]+[.F94])" office:value-type="float" office:value="0.379310344827586" calcext:value-type="float">
            <text:p>0.379310344827586</text:p>
          </table:table-cell>
          <table:table-cell table:formula="of:=2*[.I94]*[.J94]/([.I94]+[.J94])" office:value-type="float" office:value="0.468085106382979" calcext:value-type="float">
            <text:p>0.468085106382979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eve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95]/([.D95]+[.E95])" office:value-type="float" office:value="0.588235294117647" calcext:value-type="float">
            <text:p>0.588235294117647</text:p>
          </table:table-cell>
          <table:table-cell table:formula="of:=[.D95]/([.D95]+[.F95])" office:value-type="float" office:value="0.333333333333333" calcext:value-type="float">
            <text:p>0.333333333333333</text:p>
          </table:table-cell>
          <table:table-cell table:formula="of:=2*[.I95]*[.J95]/([.I95]+[.J95])" office:value-type="float" office:value="0.425531914893617" calcext:value-type="float">
            <text:p>0.425531914893617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B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96]/([.D96]+[.E96])" office:value-type="float" office:value="0.347826086956522" calcext:value-type="float">
            <text:p>0.347826086956522</text:p>
          </table:table-cell>
          <table:table-cell table:formula="of:=[.D96]/([.D96]+[.F96])" office:value-type="float" office:value="0.142857142857143" calcext:value-type="float">
            <text:p>0.142857142857143</text:p>
          </table:table-cell>
          <table:table-cell table:formula="of:=2*[.I96]*[.J96]/([.I96]+[.J96])" office:value-type="float" office:value="0.20253164556962" calcext:value-type="float">
            <text:p>0.20253164556962</text:p>
          </table:table-cell>
        </table:table-row>
        <table:table-row table:style-name="ro1">
          <table:table-cell office:value-type="string" calcext:value-type="string">
            <text:p>batch2</text:p>
          </table:table-cell>
          <table:table-cell office:value-type="string" calcext:value-type="string">
            <text:p>decon</text:p>
          </table:table-cell>
          <table:table-cell office:value-type="string" calcext:value-type="string">
            <text:p>intersect</text:p>
          </table:table-cell>
          <table:table-cell office:value-type="float" office:value="774008" calcext:value-type="float">
            <text:p>774008</text:p>
          </table:table-cell>
          <table:table-cell office:value-type="float" office:value="69867" calcext:value-type="float">
            <text:p>69867</text:p>
          </table:table-cell>
          <table:table-cell office:value-type="float" office:value="1271414" calcext:value-type="float">
            <text:p>12714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[.D97]/([.D97]+[.E97])" office:value-type="float" office:value="0.917206932306325" calcext:value-type="float">
            <text:p>0.917206932306325</text:p>
          </table:table-cell>
          <table:table-cell table:formula="of:=[.D97]/([.D97]+[.F97])" office:value-type="float" office:value="0.378409932033585" calcext:value-type="float">
            <text:p>0.378409932033585</text:p>
          </table:table-cell>
          <table:table-cell table:formula="of:=2*[.I97]*[.J97]/([.I97]+[.J97])" office:value-type="float" office:value="0.535776003643793" calcext:value-type="float">
            <text:p>0.535776003643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17:15.500288900</meta:creation-date>
    <dc:date>2025-03-18T11:29:01.183150523</dc:date>
    <meta:editing-duration>PT2H6M7S</meta:editing-duration>
    <meta:editing-cycles>4</meta:editing-cycles>
    <meta:generator>LibreOffice/7.3.7.2$Linux_X86_64 LibreOffice_project/30$Build-2</meta:generator>
    <meta:document-statistic meta:table-count="1" meta:cell-count="1067" meta:object-count="0"/>
  </office:meta>
</office:document-meta>
</file>